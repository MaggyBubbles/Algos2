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text-properties officeooo:rsid="000ee5ce" officeooo:paragraph-rsid="000f7c5a"/>
    </style:style>
    <style:style style:name="P2" style:family="paragraph" style:parent-style-name="Text_20_body" style:list-style-name="L1">
      <style:text-properties fo:font-weight="normal" officeooo:rsid="000ee5ce" officeooo:paragraph-rsid="000ee5ce" style:font-weight-asian="normal" style:font-weight-complex="normal"/>
    </style:style>
    <style:style style:name="P3" style:family="paragraph" style:parent-style-name="Text_20_body" style:list-style-name="L1">
      <style:text-properties officeooo:paragraph-rsid="0010efab"/>
    </style:style>
    <style:style style:name="P4" style:family="paragraph" style:parent-style-name="Text_20_body" style:list-style-name="L1">
      <style:text-properties fo:font-weight="normal" officeooo:rsid="000ee5ce" officeooo:paragraph-rsid="0010efab" style:font-weight-asian="normal" style:font-weight-complex="normal"/>
    </style:style>
    <style:style style:name="P5" style:family="paragraph" style:parent-style-name="Text_20_body">
      <style:text-properties fo:font-weight="bold" officeooo:rsid="000f7c5a" officeooo:paragraph-rsid="000f7c5a" style:font-weight-asian="bold" style:font-weight-complex="bold"/>
    </style:style>
    <style:style style:name="P6" style:family="paragraph" style:parent-style-name="Text_20_body" style:list-style-name="L2">
      <style:text-properties fo:font-weight="normal" officeooo:rsid="000fdc13" officeooo:paragraph-rsid="000fdc13" style:font-weight-asian="normal" style:font-weight-complex="normal"/>
    </style:style>
    <style:style style:name="P7" style:family="paragraph" style:parent-style-name="Text_20_body">
      <style:text-properties fo:font-weight="bold" officeooo:rsid="000fdc13" officeooo:paragraph-rsid="000fdc13" style:font-weight-asian="bold" style:font-weight-complex="bold"/>
    </style:style>
    <style:style style:name="P8" style:family="paragraph" style:parent-style-name="Text_20_body" style:list-style-name="L3">
      <style:text-properties fo:font-weight="normal" officeooo:rsid="000fdc13" officeooo:paragraph-rsid="000fdc13" style:font-weight-asian="normal" style:font-weight-complex="normal"/>
    </style:style>
    <style:style style:name="P9" style:family="paragraph" style:parent-style-name="Text_20_body" style:list-style-name="L4">
      <style:text-properties fo:font-weight="normal" officeooo:rsid="000fdc13" officeooo:paragraph-rsid="000fdc13" style:font-weight-asian="normal" style:font-weight-complex="normal"/>
    </style:style>
    <style:style style:name="P10" style:family="paragraph" style:parent-style-name="Text_20_body" style:list-style-name="L5">
      <style:text-properties fo:font-weight="normal" officeooo:rsid="000fdc13" officeooo:paragraph-rsid="000fdc13" style:font-weight-asian="normal" style:font-weight-complex="normal"/>
    </style:style>
    <style:style style:name="P11" style:family="paragraph" style:parent-style-name="Text_20_body">
      <style:text-properties fo:font-weight="bold" officeooo:rsid="000fdc13" style:font-weight-asian="bold" style:font-weight-complex="bold"/>
    </style:style>
    <style:style style:name="P12" style:family="paragraph" style:parent-style-name="Text_20_body" style:list-style-name="L6"/>
    <style:style style:name="P13" style:family="paragraph" style:parent-style-name="Text_20_body">
      <style:text-properties officeooo:rsid="000fdc13"/>
    </style:style>
    <style:style style:name="P14" style:family="paragraph" style:parent-style-name="Text_20_body" style:list-style-name="L7"/>
    <style:style style:name="P15" style:family="paragraph" style:parent-style-name="Text_20_body" style:list-style-name="L8"/>
    <style:style style:name="P16" style:family="paragraph" style:parent-style-name="Text_20_body" style:list-style-name="L9"/>
    <style:style style:name="P17" style:family="paragraph" style:parent-style-name="Text_20_body" style:list-style-name="L10"/>
    <style:style style:name="T1" style:family="text">
      <style:text-properties fo:font-style="normal" fo:font-weight="bold" officeooo:rsid="000f7c5a" style:font-style-asian="normal" style:font-weight-asian="bold" style:font-style-complex="normal" style:font-weight-complex="bold"/>
    </style:style>
    <style:style style:name="T2" style:family="text">
      <style:text-properties fo:font-weight="bold" officeooo:rsid="000f7c5a" style:font-weight-asian="bold" style:font-weight-complex="bold"/>
    </style:style>
    <style:style style:name="T3" style:family="text">
      <style:text-properties fo:font-weight="bold" officeooo:rsid="000ee5ce" style:font-weight-asian="bold" style:font-weight-complex="bold"/>
    </style:style>
    <style:style style:name="T4" style:family="text">
      <style:text-properties fo:font-weight="normal" officeooo:rsid="00100271" style:font-weight-asian="normal" style:font-weight-complex="normal"/>
    </style:style>
    <style:style style:name="T5" style:family="text">
      <style:text-properties officeooo:rsid="00100271"/>
    </style:style>
    <style:style style:name="T6" style:family="text">
      <style:text-properties officeooo:rsid="000fdc13"/>
    </style:style>
    <style:style style:name="T7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Protokoll UE2 Treecheck</text:h>
      <text:h text:style-name="P1" text:outline-level="2" text:is-list-header="true">1. Baum einlesen</text:h>
      <text:p text:style-name="Text_20_body"><text:span text:style-name="T1">1. </text:span><text:span text:style-name="T2">I</text:span><text:span text:style-name="T3">nsersion:</text:span></text:p>
      <text:list text:style-name="L1">
        <text:list-item>
          <text:p text:style-name="P2">aus den Folien der Vorlesung übernommen</text:p>
        </text:list-item>
        <text:list-item>
          <text:p text:style-name="P3"><text:span text:style-name="T4">best case: </text:span>O(1) (wenn direkt <text:span text:style-name="T5">bei</text:span> Root <text:span text:style-name="T5">eingfügt</text:span>) </text:p>
        </text:list-item>
        <text:list-item>
          <text:p text:style-name="P4">average case: O(log n) → Baum ist gleichmäßig verteilt, ich muss nicht JEDEN Knoten zum einfügen durchlaufen</text:p>
        </text:list-item>
        <text:list-item>
          <text:p text:style-name="P2">worst case: O(n) → Baum ist eine einfach verkettete Liste</text:p>
        </text:list-item>
      </text:list>
      <text:p text:style-name="P5">2. heightAndBalance:</text:p>
      <text:list text:style-name="L2">
        <text:list-item>
          <text:p text:style-name="P6">best/average/worst case: O(n) → jeder Knoten wird einmal besucht</text:p>
        </text:list-item>
      </text:list>
      <text:p text:style-name="P7">3. findMin/findMax:</text:p>
      <text:list text:style-name="L3">
        <text:list-item>
          <text:p text:style-name="P8">best/average/worst case: O(n) → jeder Knoten wird einmal besucht</text:p>
        </text:list-item>
      </text:list>
      <text:p text:style-name="P7">4. findSum:</text:p>
      <text:list text:style-name="L4">
        <text:list-item>
          <text:p text:style-name="P9">best/average/worst case: O(n) → jeder Knoten wird einmal besucht</text:p>
        </text:list-item>
      </text:list>
      <text:p text:style-name="P7">5. countEntries:</text:p>
      <text:list text:style-name="L5">
        <text:list-item>
          <text:p text:style-name="P10">best/average/worst case: O(n) → jeder Knoten wird einmal besucht</text:p>
        </text:list-item>
      </text:list>
      <text:h text:style-name="Heading_20_2" text:outline-level="2">2. Suche im Baum:</text:h>
      <text:p text:style-name="P11">1. searchKey:</text:p>
      <text:list text:style-name="L6">
        <text:list-item>
          <text:p text:style-name="P12"><text:span text:style-name="T6">best case: O(1) → gesuchter Wert ist direkt in der Wurzel</text:span></text:p>
        </text:list-item>
        <text:list-item>
          <text:p text:style-name="P12"><text:span text:style-name="T6">•average case: O(log n) → Baum ist gleichmäßig verteilt, es wird nur ein Pfad durchsucht (nicht der ganze Baum)</text:span></text:p>
        </text:list-item>
        <text:list-item>
          <text:p text:style-name="P12"><text:span text:style-name="T6">worst case: O(n) → Baum ist eine verkettete Liste, jeder Knoten muss überprüft werden</text:span></text:p>
        </text:list-item>
      </text:list>
      <text:p text:style-name="P13"><text:line-break/><text:span text:style-name="T7">2. searchSubtree:</text:span></text:p>
      <text:list text:style-name="L7">
        <text:list-item>
          <text:p text:style-name="P14"><text:span text:style-name="T6">best case: O(m) → Subtree wird direkt an der Wurzel gefunden, nur dieser Teilbaum wird verglichen</text:span></text:p>
        </text:list-item>
      </text:list>
      <text:list text:style-name="L8">
        <text:list-item>
          <text:p text:style-name="P15"><text:span text:style-name="T6">average case: zwischen O(m) und O(n · m) → abhängig davon, wie früh der Subtree gefunden wird</text:span></text:p>
        </text:list-item>
      </text:list>
      <text:list text:style-name="L9">
        <text:list-item>
          <text:p text:style-name="P16"><text:span text:style-name="T6">worst case: O(n · m) → für jeden Knoten im großen Baum wird der Subtree vollständig verglichen</text:span></text:p>
        </text:list-item>
      </text:list>
      <text:p text:style-name="P11">3. isSameTree:</text:p>
      <text:list text:style-name="L10">
        <text:list-item>
          <text:p text:style-name="P17"><text:soft-page-break/><text:span text:style-name="T6">best/average/worst case: O(m) → jeder Knoten des Subtrees wird einmal besucht und verglichen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de" fo:country="AT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AT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21T10:58:38.794592800</meta:creation-date>
    <dc:date>2026-04-21T21:01:30.168286800</dc:date>
    <meta:editing-duration>PT1H1M58S</meta:editing-duration>
    <meta:editing-cycles>3</meta:editing-cycles>
    <meta:generator>LibreOffice/25.8.5.2$Windows_X86_64 LibreOffice_project/9c8b85f387cc00a89945a79c9e6239f32e450ac2</meta:generator>
    <meta:document-statistic meta:table-count="0" meta:image-count="0" meta:object-count="0" meta:page-count="2" meta:paragraph-count="26" meta:word-count="225" meta:character-count="1332" meta:non-whitespace-character-count="1146"/>
  </office:meta>
</office:document-meta>
</file>