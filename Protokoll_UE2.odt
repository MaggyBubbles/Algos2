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5ce" officeooo:paragraph-rsid="000ee5ce"/>
    </style:style>
    <style:style style:name="P2" style:family="paragraph" style:parent-style-name="Heading_20_2">
      <style:text-properties officeooo:rsid="000ee5ce" officeooo:paragraph-rsid="000f7c5a"/>
    </style:style>
    <style:style style:name="P3" style:family="paragraph" style:parent-style-name="Text_20_body" style:list-style-name="L1">
      <style:text-properties fo:font-weight="normal" officeooo:rsid="000ee5ce" officeooo:paragraph-rsid="000ee5ce" style:font-weight-asian="normal" style:font-weight-complex="normal"/>
    </style:style>
    <style:style style:name="P4" style:family="paragraph" style:parent-style-name="Text_20_body">
      <style:text-properties fo:font-weight="bold" officeooo:rsid="000f7c5a" officeooo:paragraph-rsid="000f7c5a" style:font-weight-asian="bold" style:font-weight-complex="bold"/>
    </style:style>
    <style:style style:name="P5" style:family="paragraph" style:parent-style-name="Text_20_body" style:list-style-name="L2">
      <style:text-properties fo:font-weight="normal" officeooo:rsid="000fdc13" officeooo:paragraph-rsid="000fdc13" style:font-weight-asian="normal" style:font-weight-complex="normal"/>
    </style:style>
    <style:style style:name="P6" style:family="paragraph" style:parent-style-name="Text_20_body">
      <style:text-properties fo:font-weight="bold" officeooo:rsid="000fdc13" officeooo:paragraph-rsid="000fdc13" style:font-weight-asian="bold" style:font-weight-complex="bold"/>
    </style:style>
    <style:style style:name="P7" style:family="paragraph" style:parent-style-name="Text_20_body" style:list-style-name="L3">
      <style:text-properties fo:font-weight="normal" officeooo:rsid="000fdc13" officeooo:paragraph-rsid="000fdc13" style:font-weight-asian="normal" style:font-weight-complex="normal"/>
    </style:style>
    <style:style style:name="P8" style:family="paragraph" style:parent-style-name="Text_20_body" style:list-style-name="L4">
      <style:text-properties fo:font-weight="normal" officeooo:rsid="000fdc13" officeooo:paragraph-rsid="000fdc13" style:font-weight-asian="normal" style:font-weight-complex="normal"/>
    </style:style>
    <style:style style:name="P9" style:family="paragraph" style:parent-style-name="Text_20_body" style:list-style-name="L5">
      <style:text-properties fo:font-weight="normal" officeooo:rsid="000fdc13" officeooo:paragraph-rsid="000fdc13" style:font-weight-asian="normal" style:font-weight-complex="normal"/>
    </style:style>
    <style:style style:name="T1" style:family="text">
      <style:text-properties fo:font-style="normal" fo:font-weight="bold" officeooo:rsid="000f7c5a" style:font-style-asian="normal" style:font-weight-asian="bold" style:font-style-complex="normal" style:font-weight-complex="bold"/>
    </style:style>
    <style:style style:name="T2" style:family="text">
      <style:text-properties fo:font-weight="bold" officeooo:rsid="000f7c5a" style:font-weight-asian="bold" style:font-weight-complex="bold"/>
    </style:style>
    <style:style style:name="T3" style:family="text">
      <style:text-properties fo:font-weight="bold" officeooo:rsid="000ee5ce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koll UE2 Treecheck</text:h>
      <text:p text:style-name="P1"/>
      <text:h text:style-name="P2" text:outline-level="2" text:is-list-header="true">1. Baum einlesen</text:h>
      <text:p text:style-name="Text_20_body"><text:span text:style-name="T1">1. </text:span><text:span text:style-name="T2">I</text:span><text:span text:style-name="T3">nsersion:</text:span></text:p>
      <text:list text:style-name="L1">
        <text:list-item>
          <text:p text:style-name="P3">aus den Folien der Vorlesung übernommen</text:p>
        </text:list-item>
        <text:list-item>
          <text:p text:style-name="P3">best/average case: O(log n) → Baum ist gleichmäßig verteilt, ich muss nicht JEDEN Knoten zum einfügen durchlaufen</text:p>
        </text:list-item>
        <text:list-item>
          <text:p text:style-name="P3">worst case: O(n) → Baum ist eine einfach verkettete Liste</text:p>
        </text:list-item>
      </text:list>
      <text:p text:style-name="P4">2. heightAndBalance:</text:p>
      <text:list text:style-name="L2">
        <text:list-item>
          <text:p text:style-name="P5">best/average/worst case: O(n) → jeder Knoten wird einmal besucht</text:p>
        </text:list-item>
      </text:list>
      <text:p text:style-name="P6">3. findMin/findMax:</text:p>
      <text:list text:style-name="L3">
        <text:list-item>
          <text:p text:style-name="P7">best/average/worst case: O(n) → jeder Knoten wird einmal besucht</text:p>
        </text:list-item>
      </text:list>
      <text:p text:style-name="P6">4. findSum:</text:p>
      <text:list text:style-name="L4">
        <text:list-item>
          <text:p text:style-name="P8">best/average/worst case: O(n) → jeder Knoten wird einmal besucht</text:p>
        </text:list-item>
      </text:list>
      <text:p text:style-name="P6">5. countEntries:</text:p>
      <text:list text:style-name="L5">
        <text:list-item>
          <text:p text:style-name="P9">best/average/worst case: O(n) → jeder Knoten wird einmal besuc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0:58:38.794592800</meta:creation-date>
    <dc:date>2026-04-21T12:17:39.439613900</dc:date>
    <meta:editing-duration>PT57M55S</meta:editing-duration>
    <meta:editing-cycles>1</meta:editing-cycles>
    <meta:document-statistic meta:table-count="0" meta:image-count="0" meta:object-count="0" meta:page-count="1" meta:paragraph-count="14" meta:word-count="92" meta:character-count="590" meta:non-whitespace-character-count="519"/>
    <meta:generator>LibreOffice/25.8.5.2$Windows_X86_64 LibreOffice_project/9c8b85f387cc00a89945a79c9e6239f32e450ac2</meta:generator>
  </office:meta>
</office:document-meta>
</file>