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ee5ce" officeooo:paragraph-rsid="000f7c5a"/>
    </style:style>
    <style:style style:name="P2" style:family="paragraph" style:parent-style-name="Text_20_body" style:list-style-name="L1">
      <style:text-properties fo:font-weight="normal" officeooo:rsid="000ee5ce" officeooo:paragraph-rsid="000ee5ce" style:font-weight-asian="normal" style:font-weight-complex="normal"/>
    </style:style>
    <style:style style:name="P3" style:family="paragraph" style:parent-style-name="Text_20_body" style:list-style-name="L1">
      <style:text-properties officeooo:paragraph-rsid="0010efab"/>
    </style:style>
    <style:style style:name="P4" style:family="paragraph" style:parent-style-name="Text_20_body" style:list-style-name="L1">
      <style:text-properties fo:font-weight="normal" officeooo:rsid="000ee5ce" officeooo:paragraph-rsid="0010efab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131f96" officeooo:paragraph-rsid="00131f96" style:font-weight-asian="normal" style:font-weight-complex="normal"/>
    </style:style>
    <style:style style:name="P6" style:family="paragraph" style:parent-style-name="Text_20_body">
      <style:text-properties fo:font-weight="bold" officeooo:rsid="000f7c5a" officeooo:paragraph-rsid="000f7c5a" style:font-weight-asian="bold" style:font-weight-complex="bold"/>
    </style:style>
    <style:style style:name="P7" style:family="paragraph" style:parent-style-name="Text_20_body" style:list-style-name="L2">
      <style:text-properties fo:font-weight="normal" officeooo:rsid="000fdc13" officeooo:paragraph-rsid="000fdc13" style:font-weight-asian="normal" style:font-weight-complex="normal"/>
    </style:style>
    <style:style style:name="P8" style:family="paragraph" style:parent-style-name="Text_20_body" style:list-style-name="L2">
      <style:text-properties fo:font-weight="normal" officeooo:rsid="00131f96" officeooo:paragraph-rsid="00131f96" style:font-weight-asian="normal" style:font-weight-complex="normal"/>
    </style:style>
    <style:style style:name="P9" style:family="paragraph" style:parent-style-name="Text_20_body">
      <style:text-properties fo:font-weight="bold" officeooo:rsid="000fdc13" officeooo:paragraph-rsid="000fdc13" style:font-weight-asian="bold" style:font-weight-complex="bold"/>
    </style:style>
    <style:style style:name="P10" style:family="paragraph" style:parent-style-name="Text_20_body" style:list-style-name="L3">
      <style:text-properties fo:font-weight="normal" officeooo:rsid="000fdc13" officeooo:paragraph-rsid="000fdc13" style:font-weight-asian="normal" style:font-weight-complex="normal"/>
    </style:style>
    <style:style style:name="P11" style:family="paragraph" style:parent-style-name="Text_20_body" style:list-style-name="L3">
      <style:text-properties fo:font-weight="normal" officeooo:rsid="00131f96" officeooo:paragraph-rsid="00131f96" style:font-weight-asian="normal" style:font-weight-complex="normal"/>
    </style:style>
    <style:style style:name="P12" style:family="paragraph" style:parent-style-name="Text_20_body" style:list-style-name="L4">
      <style:text-properties fo:font-weight="normal" officeooo:rsid="000fdc13" officeooo:paragraph-rsid="000fdc13" style:font-weight-asian="normal" style:font-weight-complex="normal"/>
    </style:style>
    <style:style style:name="P13" style:family="paragraph" style:parent-style-name="Text_20_body" style:list-style-name="L4">
      <style:text-properties fo:font-weight="normal" officeooo:rsid="00131f96" officeooo:paragraph-rsid="00131f96" style:font-weight-asian="normal" style:font-weight-complex="normal"/>
    </style:style>
    <style:style style:name="P14" style:family="paragraph" style:parent-style-name="Text_20_body" style:list-style-name="L5">
      <style:text-properties fo:font-weight="normal" officeooo:rsid="000fdc13" officeooo:paragraph-rsid="000fdc13" style:font-weight-asian="normal" style:font-weight-complex="normal"/>
    </style:style>
    <style:style style:name="P15" style:family="paragraph" style:parent-style-name="Text_20_body" style:list-style-name="L5">
      <style:text-properties fo:font-weight="normal" officeooo:rsid="00131f96" officeooo:paragraph-rsid="00131f96" style:font-weight-asian="normal" style:font-weight-complex="normal"/>
    </style:style>
    <style:style style:name="P16" style:family="paragraph" style:parent-style-name="Heading_20_2" style:list-style-name=""/>
    <style:style style:name="P17" style:family="paragraph" style:parent-style-name="Heading_20_2">
      <style:paragraph-properties fo:break-before="page"/>
    </style:style>
    <style:style style:name="P18" style:family="paragraph" style:parent-style-name="Text_20_body">
      <style:text-properties fo:font-weight="bold" officeooo:rsid="000fdc13" style:font-weight-asian="bold" style:font-weight-complex="bold"/>
    </style:style>
    <style:style style:name="P19" style:family="paragraph" style:parent-style-name="Text_20_body" style:list-style-name="L6">
      <style:text-properties officeooo:rsid="000fdc13"/>
    </style:style>
    <style:style style:name="P20" style:family="paragraph" style:parent-style-name="Text_20_body" style:list-style-name="L6">
      <style:text-properties officeooo:paragraph-rsid="00138692"/>
    </style:style>
    <style:style style:name="P21" style:family="paragraph" style:parent-style-name="Text_20_body">
      <style:text-properties officeooo:rsid="00145f53" officeooo:paragraph-rsid="00145f53"/>
    </style:style>
    <style:style style:name="P22" style:family="paragraph" style:parent-style-name="Text_20_body" style:list-style-name="L6">
      <style:text-properties officeooo:rsid="000fdc13" officeooo:paragraph-rsid="00145f53"/>
    </style:style>
    <style:style style:name="P23" style:family="paragraph" style:parent-style-name="Text_20_body" style:list-style-name="L6">
      <style:text-properties officeooo:paragraph-rsid="00145f53"/>
    </style:style>
    <style:style style:name="P24" style:family="paragraph" style:parent-style-name="Text_20_body">
      <style:text-properties officeooo:rsid="000fdc13"/>
    </style:style>
    <style:style style:name="P25" style:family="paragraph" style:parent-style-name="Text_20_body" style:list-style-name="L7">
      <style:text-properties officeooo:rsid="000fdc13"/>
    </style:style>
    <style:style style:name="P26" style:family="paragraph" style:parent-style-name="Text_20_body" style:list-style-name="L8">
      <style:text-properties officeooo:rsid="000fdc13"/>
    </style:style>
    <style:style style:name="P27" style:family="paragraph" style:parent-style-name="Text_20_body" style:list-style-name="L9">
      <style:text-properties officeooo:rsid="000fdc13"/>
    </style:style>
    <style:style style:name="P28" style:family="paragraph" style:parent-style-name="Text_20_body" style:list-style-name="L9">
      <style:text-properties officeooo:paragraph-rsid="00138692"/>
    </style:style>
    <style:style style:name="P29" style:family="paragraph" style:parent-style-name="Text_20_body" style:list-style-name="L10"/>
    <style:style style:name="P30" style:family="paragraph" style:parent-style-name="Text_20_body" style:list-style-name="L10">
      <style:text-properties officeooo:paragraph-rsid="00138692"/>
    </style:style>
    <style:style style:name="T1" style:family="text">
      <style:text-properties fo:font-style="normal" fo:font-weight="bold" officeooo:rsid="000f7c5a" style:font-style-asian="normal" style:font-weight-asian="bold" style:font-style-complex="normal" style:font-weight-complex="bold"/>
    </style:style>
    <style:style style:name="T2" style:family="text">
      <style:text-properties fo:font-weight="bold" officeooo:rsid="000f7c5a" style:font-weight-asian="bold" style:font-weight-complex="bold"/>
    </style:style>
    <style:style style:name="T3" style:family="text">
      <style:text-properties fo:font-weight="bold" officeooo:rsid="000ee5ce" style:font-weight-asian="bold" style:font-weight-complex="bold"/>
    </style:style>
    <style:style style:name="T4" style:family="text">
      <style:text-properties fo:font-weight="normal" officeooo:rsid="00100271" style:font-weight-asian="normal" style:font-weight-complex="normal"/>
    </style:style>
    <style:style style:name="T5" style:family="text">
      <style:text-properties officeooo:rsid="00100271"/>
    </style:style>
    <style:style style:name="T6" style:family="text">
      <style:text-properties officeooo:rsid="0013869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dc13" style:font-weight-asian="bold" style:font-weight-complex="bold"/>
    </style:style>
    <style:style style:name="T9" style:family="text">
      <style:text-properties officeooo:rsid="00145f53"/>
    </style:style>
    <style:style style:name="T10" style:family="text">
      <style:text-properties fo:font-weight="bold" officeooo:rsid="00145f53" style:font-weight-asian="bold" style:font-weight-complex="bold"/>
    </style:style>
    <style:style style:name="T11" style:family="text">
      <style:text-properties officeooo:rsid="000fdc1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tokoll UE2 Treecheck</text:h>
      <text:h text:style-name="P1" text:outline-level="2" text:is-list-header="true">1. Baum einlesen</text:h>
      <text:p text:style-name="Text_20_body"><text:span text:style-name="T1">1. </text:span><text:span text:style-name="T2">I</text:span><text:span text:style-name="T3">nsersion:</text:span></text:p>
      <text:list text:style-name="L1">
        <text:list-item>
          <text:p text:style-name="P2">aus den Folien der Vorlesung übernommen</text:p>
        </text:list-item>
        <text:list-item>
          <text:p text:style-name="P3"><text:span text:style-name="T4">best case: </text:span>O(1) (wenn direkt <text:span text:style-name="T5">bei</text:span> Root <text:span text:style-name="T5">eingfügt</text:span>) </text:p>
        </text:list-item>
        <text:list-item>
          <text:p text:style-name="P4">average case: O(log n) → Baum ist gleichmäßig verteilt, ich muss nicht JEDEN Knoten zum einfügen durchlaufen</text:p>
        </text:list-item>
        <text:list-item>
          <text:p text:style-name="P2">worst case: O(n) → Baum ist eine einfach verkettete Liste</text:p>
        </text:list-item>
        <text:list-item>
          <text:p text:style-name="P5">Beschreibung: geht von der Wurzel aus die Knoten entlang, entweder nach links oder rechts, je nachdem ob der Wert größer oder kleiner ist, als der aktuelle Knoten</text:p>
        </text:list-item>
      </text:list>
      <text:p text:style-name="P6">2. heightAndBalance:</text:p>
      <text:list text:style-name="L2">
        <text:list-item>
          <text:p text:style-name="P7">best/average/worst case: O(n) → jeder Knoten wird einmal besucht</text:p>
        </text:list-item>
        <text:list-item>
          <text:p text:style-name="P8">Beschreibung: Post Order → rechnet vom letzten Knoten zum darüber liegenden dazu; vergleicht, welcher Wert größer ist und gibt diesen an den darüber liegend Knoten weiter, usw.</text:p>
        </text:list-item>
      </text:list>
      <text:p text:style-name="P9">3. findMin/findMax:</text:p>
      <text:list text:style-name="L3">
        <text:list-item>
          <text:p text:style-name="P10">best/average/worst case: O(n) → jeder Knoten wird einmal besucht</text:p>
        </text:list-item>
        <text:list-item>
          <text:p text:style-name="P11">Beschreibung: Post Order → liefert dem Knoten von unten die Werte von seinem left/right vergleicht diese und nimmt den größeren für max, kleineren für min. Dieser Wert wird wieder an den darüber liegenden Knote gegeben zum Vergleichen, ect.</text:p>
        </text:list-item>
      </text:list>
      <text:p text:style-name="P9">4. findSum:</text:p>
      <text:list text:style-name="L4">
        <text:list-item>
          <text:p text:style-name="P12">best/average/worst case: O(n) → jeder Knoten wird einmal besucht</text:p>
        </text:list-item>
        <text:list-item>
          <text:p text:style-name="P13">Beschreibung: Post Order wie bei den vorherigen Funktionen; Rechnen aktuellen Wert zusammen mit den Werten von links und rechts und gibt es nach oben weiter.</text:p>
        </text:list-item>
      </text:list>
      <text:p text:style-name="P9">5. countEntries:</text:p>
      <text:list text:style-name="L5">
        <text:list-item>
          <text:p text:style-name="P14">best/average/worst case: O(n) → jeder Knoten wird einmal besucht</text:p>
        </text:list-item>
        <text:list-item>
          <text:p text:style-name="P15">Beschreibung: Wieder Post Order; rechnet einfach immer eins zum Knoten dazu und gibt den Wert zum Knoten darüber weiter.</text:p>
        </text:list-item>
      </text:list>
      <text:h text:style-name="P16" text:outline-level="2"/>
      <text:h text:style-name="P17" text:outline-level="2">2. Suche im Baum:</text:h>
      <text:p text:style-name="P18">1. searchKey:</text:p>
      <text:list text:style-name="L6">
        <text:list-item>
          <text:p text:style-name="P19">best case: O(1) → gesuchter Wert ist direkt in der Wurzel</text:p>
        </text:list-item>
        <text:list-item>
          <text:p text:style-name="P19">average case: O(log n) → Baum ist gleichmäßig verteilt, es wird nur ein Pfad durchsucht (nicht der ganze Baum)</text:p>
        </text:list-item>
        <text:list-item>
          <text:p text:style-name="P19">worst case: O(n) → Baum ist eine verkettete Liste, jeder Knoten muss überprüft werden</text:p>
        </text:list-item>
        <text:list-item>
          <text:p text:style-name="P20"><text:span text:style-name="T6">Beschreibung: </text:span>Die Funktion dient als Schnittstelle zur Suche und ruft die rekursive Hilfsfunktion searchKeyHelper auf.<text:line-break/>Abhängig vom Ergebnis wird ausgegeben, ob der gesuchte Schlüssel im Baum enthalten ist.<text:line-break/>Im Erfolgsfall wird zusätzlich der Pfad vom Wurzelknoten bis zum gefundenen Knoten ausgegeben. </text:p>
        </text:list-item>
      </text:list>
      <text:p text:style-name="P21"><text:span text:style-name="T7">2</text:span><text:span text:style-name="T8">. searchKey</text:span><text:span text:style-name="T7">Helper</text:span><text:span text:style-name="T8">:</text:span></text:p>
      <text:list text:continue-numbering="true" text:style-name="L6">
        <text:list-item>
          <text:p text:style-name="P22">best case: O(1) → gesuchter Wert ist direkt in der Wurzel</text:p>
        </text:list-item>
        <text:list-item>
          <text:p text:style-name="P22">average case: O(log n) → Baum ist gleichmäßig verteilt, es wird nur ein Pfad durchsucht (nicht der ganze Baum)</text:p>
        </text:list-item>
        <text:list-item>
          <text:p text:style-name="P22">worst case: O(n) → Baum ist eine verkettete Liste, jeder Knoten muss überprüft werden</text:p>
        </text:list-item>
        <text:list-item>
          <text:p text:style-name="P23"><text:span text:style-name="T9">Beschreibung: </text:span>Durchsucht den Baum rekursiv nach einem Schlüssel und speichert dabei den Pfad. Gibt die Länge des Pfades zurück oder 0, falls der Schlüssel nicht gefunden wurde. </text:p>
        </text:list-item>
      </text:list>
      <text:p text:style-name="P24"><text:line-break/><text:span text:style-name="T10">3</text:span><text:span text:style-name="T7">. searchSubtree:</text:span></text:p>
      <text:list text:style-name="L7">
        <text:list-item>
          <text:p text:style-name="P25">best case: O(m) → Subtree wird direkt an der Wurzel gefunden, nur dieser Teilbaum wird verglichen</text:p>
        </text:list-item>
      </text:list>
      <text:list text:style-name="L8">
        <text:list-item>
          <text:p text:style-name="P26">average case: zwischen O(m) und O(n · m) → abhängig davon, wie früh der Subtree gefunden wird</text:p>
        </text:list-item>
      </text:list>
      <text:list text:style-name="L9">
        <text:list-item>
          <text:p text:style-name="P27">worst case: O(n · m) → für jeden Knoten im großen Baum wird der Subtree vollständig verglichen</text:p>
        </text:list-item>
        <text:list-item>
          <text:p text:style-name="P28"><text:span text:style-name="T6">Beschreibung: </text:span>Die Funktion durchsucht den gesamten Baum rekursiv und prüft an jedem Knoten, ob dort der gegebene Subtree beginnt. Dazu wird die Funktion isSameTree verwendet, um die Teilbäume zu vergleichen. </text:p>
        </text:list-item>
      </text:list>
      <text:p text:style-name="P18"><text:span text:style-name="T9">4</text:span>. isSameTree:</text:p>
      <text:list text:style-name="L10">
        <text:list-item>
          <text:p text:style-name="P29"><text:span text:style-name="T11">best/average/worst case: O(m) → jeder Knoten des Subtrees wird einmal besucht und verglichen</text:span></text:p>
        </text:list-item>
        <text:list-item>
          <text:p text:style-name="P30"><text:span text:style-name="T6">Beschreibung: </text:span>Vergleicht zwei Teilbäume rekursiv und prüft, ob sie in Struktur und Werten vollständig identisch sind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56c33" officeooo:paragraph-rsid="00156c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iemiec Joanna, Kendöl Magdalena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10:58:38.794592800</meta:creation-date>
    <dc:date>2026-04-21T21:33:41.205322000</dc:date>
    <meta:editing-duration>PT1H20M7S</meta:editing-duration>
    <meta:editing-cycles>9</meta:editing-cycles>
    <meta:generator>LibreOffice/25.8.5.2$Windows_X86_64 LibreOffice_project/9c8b85f387cc00a89945a79c9e6239f32e450ac2</meta:generator>
    <meta:print-date>2026-04-21T21:33:11.854202900</meta:print-date>
    <meta:printed-by>PDF-Dateien</meta:printed-by>
    <meta:document-statistic meta:table-count="0" meta:image-count="0" meta:object-count="0" meta:page-count="2" meta:paragraph-count="40" meta:word-count="537" meta:character-count="3306" meta:non-whitespace-character-count="2830"/>
  </office:meta>
</office:document-meta>
</file>